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A0000000DAD0FC76F.png" manifest:media-type="image/png"/>
  <manifest:file-entry manifest:full-path="Pictures/100038C500000D560000015F8407326E.svg" manifest:media-type="image/svg+xml"/>
  <manifest:file-entry manifest:full-path="Pictures/1000000100000058000000209CE8C837.png" manifest:media-type="image/png"/>
  <manifest:file-entry manifest:full-path="Pictures/10000001000000720000001A19C25EAE.png" manifest:media-type="image/png"/>
  <manifest:file-entry manifest:full-path="Pictures/10000001000000720000000C8BCCC292.png" manifest:media-type="image/png"/>
  <manifest:file-entry manifest:full-path="Pictures/10000001000000900000001B82325F4C.png" manifest:media-type="image/png"/>
  <manifest:file-entry manifest:full-path="Pictures/100036F000000C7C00000157C410D874.svg" manifest:media-type="image/svg+xml"/>
  <manifest:file-entry manifest:full-path="Pictures/1000439E00000FAE000002E7A1781E2D.svg" manifest:media-type="image/svg+xml"/>
  <manifest:file-entry manifest:full-path="Pictures/10000001000000930000001B95A96E6B.png" manifest:media-type="image/png"/>
  <manifest:file-entry manifest:full-path="Pictures/1000403500000DD700000154D3FED508.svg" manifest:media-type="image/svg+xml"/>
  <manifest:file-entry manifest:full-path="Pictures/1000358D00000C78000002E3D6578950.svg" manifest:media-type="image/svg+xml"/>
  <manifest:file-entry manifest:full-path="Pictures/100000010000007F0000000CCC9EB07B.png" manifest:media-type="image/png"/>
  <manifest:file-entry manifest:full-path="Pictures/10000001000000930000001BF9E08C22.png" manifest:media-type="image/png"/>
  <manifest:file-entry manifest:full-path="Pictures/1000455F00001038000001548145A3D1.svg" manifest:media-type="image/svg+xml"/>
  <manifest:file-entry manifest:full-path="Pictures/10000001000000570000001A5E36C9EC.png" manifest:media-type="image/png"/>
  <manifest:file-entry manifest:full-path="Pictures/10002EAE0000097C000002D73B2DD220.svg" manifest:media-type="image/svg+xml"/>
  <manifest:file-entry manifest:full-path="Pictures/10004AFD00000FFF000002E70087B62B.svg" manifest:media-type="image/svg+xml"/>
  <manifest:file-entry manifest:full-path="Pictures/100034B80000099C0000037DAEAE4C34.svg" manifest:media-type="image/svg+xml"/>
  <manifest:file-entry manifest:full-path="Pictures/10000001000000950000000C8D353A01.png" manifest:media-type="image/png"/>
  <manifest:file-entry manifest:full-path="Pictures/10000001000000A30000001A3BE21348.png" manifest:media-type="image/png"/>
  <manifest:file-entry manifest:full-path="Pictures/100000010000003B00000020707F72E8.png" manifest:media-type="image/png"/>
  <manifest:file-entry manifest:full-path="Pictures/10002A41000006690000037D191F4B2C.svg" manifest:media-type="image/svg+xml"/>
  <manifest:file-entry manifest:full-path="Pictures/1000452000001009000002E7304BAC1C.svg" manifest:media-type="image/svg+xml"/>
  <manifest:file-entry manifest:full-path="Pictures/100050C7000011C9000002CDAC711BAB.svg" manifest:media-type="image/svg+xml"/>
  <manifest:file-entry manifest:full-path="Pictures/10000001000000960000001B8958BFD0.png" manifest:media-type="image/png"/>
  <manifest:file-entry manifest:full-path="Pictures/10004F4E00001188000002E7F9435303.svg" manifest:media-type="image/svg+xml"/>
  <manifest:file-entry manifest:full-path="Pictures/10004C7C0000105B000002E7CF599371.svg" manifest:media-type="image/svg+xml"/>
  <manifest:file-entry manifest:full-path="Pictures/10000001000000A10000001B41077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d49" officeooo:paragraph-rsid="001fbd49"/>
    </style:style>
    <style:style style:name="P2" style:family="paragraph" style:parent-style-name="Standard">
      <style:text-properties style:text-position="0% 100%" officeooo:rsid="001fbd49" officeooo:paragraph-rsid="00207578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Standard">
      <style:text-properties style:text-position="0% 100%" officeooo:rsid="00207578" officeooo:paragraph-rsid="00207578"/>
    </style:style>
    <style:style style:name="P5" style:family="paragraph" style:parent-style-name="Standard">
      <style:text-properties fo:color="#f10d0c" loext:opacity="100%" officeooo:rsid="001fbd49" officeooo:paragraph-rsid="001fbd49"/>
    </style:style>
    <style:style style:name="P6" style:family="paragraph" style:parent-style-name="Standard">
      <style:text-properties officeooo:rsid="0023314e" officeooo:paragraph-rsid="0023314e"/>
    </style:style>
    <style:style style:name="P7" style:family="paragraph" style:parent-style-name="Standard">
      <style:text-properties officeooo:rsid="001fbd49" officeooo:paragraph-rsid="00208ec6"/>
    </style:style>
    <style:style style:name="P8" style:family="paragraph" style:parent-style-name="Standard">
      <style:paragraph-properties fo:text-align="center" style:justify-single-word="false"/>
      <style:text-properties fo:color="#f10d0c" loext:opacity="100%" officeooo:rsid="00262e6f" officeooo:paragraph-rsid="00262e6f"/>
    </style:style>
    <style:style style:name="P9" style:family="paragraph" style:parent-style-name="Standard">
      <style:paragraph-properties fo:text-align="left" style:justify-single-word="false"/>
      <style:text-properties fo:color="#000000" loext:opacity="100%" officeooo:rsid="00262e6f" officeooo:paragraph-rsid="00262e6f"/>
    </style:style>
    <style:style style:name="P10" style:family="paragraph" style:parent-style-name="Standard">
      <style:paragraph-properties fo:text-align="left" style:justify-single-word="false" style:writing-mode="lr-tb" style:writing-mode-automatic="false"/>
      <style:text-properties fo:color="#000000" loext:opacity="100%" officeooo:rsid="00262e6f" officeooo:paragraph-rsid="00262e6f"/>
    </style:style>
    <style:style style:name="P11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Helvetica" fo:font-size="15pt" fo:letter-spacing="normal" fo:font-style="normal" fo:font-weight="normal" officeooo:rsid="00262e6f" officeooo:paragraph-rsid="002e629c"/>
    </style:style>
    <style:style style:name="P12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Helvetica" fo:font-size="14.25pt" fo:letter-spacing="normal" fo:font-style="normal" fo:font-weight="normal" officeooo:rsid="00262e6f" officeooo:paragraph-rsid="002e629c"/>
    </style:style>
    <style:style style:name="P13" style:family="paragraph" style:parent-style-name="Standard">
      <style:paragraph-properties fo:text-align="left" style:justify-single-word="false"/>
      <style:text-properties fo:font-variant="normal" fo:text-transform="none" fo:color="#000000" loext:opacity="100%" style:text-position="0% 100%" style:font-name="Helvetica" fo:font-size="15pt" fo:letter-spacing="normal" fo:font-style="normal" fo:font-weight="normal" officeooo:rsid="00262e6f" officeooo:paragraph-rsid="002e629c"/>
    </style:style>
    <style:style style:name="P14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Helvetica" fo:font-size="15pt" fo:letter-spacing="normal" fo:font-style="normal" fo:font-weight="normal" officeooo:rsid="00262e6f" officeooo:paragraph-rsid="00262e6f"/>
    </style:style>
    <style:style style:name="P15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0003e" officeooo:paragraph-rsid="0030003e" style:font-size-asian="12pt" style:font-size-complex="12pt"/>
    </style:style>
    <style:style style:name="P16" style:family="paragraph" style:parent-style-name="Standard">
      <style:paragraph-properties fo:text-align="left" style:justify-single-word="false" fo:break-before="page"/>
      <style:text-properties fo:font-variant="normal" fo:text-transform="none" fo:color="#000000" loext:opacity="100%" style:font-name="Helvetica" fo:font-size="15pt" fo:letter-spacing="normal" fo:font-style="normal" fo:font-weight="normal" officeooo:rsid="00262e6f" officeooo:paragraph-rsid="00262e6f"/>
    </style:style>
    <style:style style:name="T1" style:family="text">
      <style:text-properties fo:font-size="14pt" fo:font-weight="bold" officeooo:rsid="00208ec6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4dd44" style:font-size-asian="12.25pt" style:font-weight-asian="bold" style:font-size-complex="14pt" style:font-weight-complex="bold"/>
    </style:style>
    <style:style style:name="T3" style:family="text">
      <style:text-properties officeooo:rsid="00207578"/>
    </style:style>
    <style:style style:name="T4" style:family="text">
      <style:text-properties fo:color="#f10d0c" loext:opacity="100%"/>
    </style:style>
    <style:style style:name="T5" style:family="text">
      <style:text-properties style:text-position="0% 100%"/>
    </style:style>
    <style:style style:name="T6" style:family="text">
      <style:text-properties officeooo:rsid="003324c4"/>
    </style:style>
    <style:style style:name="T7" style:family="text">
      <style:text-properties officeooo:rsid="002e629c"/>
    </style:style>
    <style:style style:name="T8" style:family="text">
      <style:text-properties officeooo:rsid="002d4e79"/>
    </style:style>
    <style:style style:name="T9" style:family="text">
      <style:text-properties officeooo:rsid="002d5885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Solving equations </text:span><text:span text:style-name="T2">using evidence and zero.</text:span></text:p>
      <text:p text:style-name="P1"/>
      <text:p text:style-name="P1">So, we have <text:span text:style-name="T3">(as an example)</text:span></text:p>
      <text:p text:style-name="P1"/>
      <text:p text:style-name="P2"><draw:frame text:anchor-type="as-char" svg:y="-0.1457in" draw:z-index="0" draw:name="Shape1" draw:style-name="gr1" draw:text-style-name="P3" svg:width="1.6732in" svg:height="0.1606in"><draw:image xlink:href="Pictures/1000403500000DD700000154D3FED508.svg" xlink:type="simple" xlink:show="embed" xlink:actuate="onLoad" draw:mime-type="image/svg+xml"><text:p/></draw:image><draw:image xlink:href="Pictures/100000010000007F0000000CCC9EB07B.png" xlink:type="simple" xlink:show="embed" xlink:actuate="onLoad" draw:mime-type="image/png"/><svg:title>TexMaths</svg:title><svg:desc>12§display§x^4 +3x^3 + 5x^2 + x = 2§svg§600§FALSE§</svg:desc></draw:frame></text:p>
      <text:p text:style-name="P1"/>
      <text:p text:style-name="P1">Subtract 2 by both sides</text:p>
      <text:p text:style-name="P1"/>
      <text:p text:style-name="P2"><draw:frame text:anchor-type="as-char" svg:y="-0.1457in" draw:z-index="1" draw:name="Shape2" draw:style-name="gr1" draw:text-style-name="P3" svg:width="1.9606in" svg:height="0.1606in"><draw:image xlink:href="Pictures/1000455F00001038000001548145A3D1.svg" xlink:type="simple" xlink:show="embed" xlink:actuate="onLoad" draw:mime-type="image/svg+xml"><text:p/></draw:image><draw:image xlink:href="Pictures/10000001000000950000000C8D353A01.png" xlink:type="simple" xlink:show="embed" xlink:actuate="onLoad" draw:mime-type="image/png"/><svg:title>TexMaths</svg:title><svg:desc>12§display§x^4 +3x^3 + 5x^2 + x -2  = 0§svg§600§FALSE§</svg:desc></draw:frame></text:p>
      <text:p text:style-name="P1"/>
      <text:p text:style-name="P1">Put x in evidence.</text:p>
      <text:p text:style-name="P1"/>
      <text:p text:style-name="P2"><draw:frame text:anchor-type="as-char" svg:y="-0.222in" draw:z-index="2" draw:name="Shape3" draw:style-name="gr1" draw:text-style-name="P3" svg:width="2.1516in" svg:height="0.3386in"><draw:image xlink:href="Pictures/100050C7000011C9000002CDAC711BAB.svg" xlink:type="simple" xlink:show="embed" xlink:actuate="onLoad" draw:mime-type="image/svg+xml"><text:p/></draw:image><draw:image xlink:href="Pictures/10000001000000A30000001A3BE21348.png" xlink:type="simple" xlink:show="embed" xlink:actuate="onLoad" draw:mime-type="image/png"/><svg:title>TexMaths</svg:title><svg:desc>12§display§x(x^3 + 3x^2 + 5x + 1 - \frac{2}{x}) = 0§svg§600§FALSE§</svg:desc></draw:frame></text:p>
      <text:p text:style-name="P1"/>
      <text:p text:style-name="P2"><draw:frame text:anchor-type="as-char" svg:y="-0.2311in" draw:z-index="3" draw:name="Shape4" draw:style-name="gr1" draw:text-style-name="P3" svg:width="1.978in" svg:height="0.3516in"><draw:image xlink:href="Pictures/10004C7C0000105B000002E7CF599371.svg" xlink:type="simple" xlink:show="embed" xlink:actuate="onLoad" draw:mime-type="image/svg+xml"><text:p/></draw:image><draw:image xlink:href="Pictures/10000001000000960000001B8958BFD0.png" xlink:type="simple" xlink:show="embed" xlink:actuate="onLoad" draw:mime-type="image/png"/><svg:title>TexMaths</svg:title><svg:desc>12§display§x^3 + 3x^2 + 5x + 1 - \frac{2}{x} = \frac{0}{x}§svg§600§FALSE§</svg:desc></draw:frame></text:p>
      <text:p text:style-name="P1"/>
      <text:p text:style-name="P1">So, dividing zero, by x, right side</text:p>
      <text:p text:style-name="P1"/>
      <text:p text:style-name="P2"><draw:frame text:anchor-type="as-char" svg:y="-0.2311in" draw:z-index="4" draw:name="Shape5" draw:style-name="gr1" draw:text-style-name="P3" svg:width="1.9398in" svg:height="0.3516in"><draw:image xlink:href="Pictures/1000452000001009000002E7304BAC1C.svg" xlink:type="simple" xlink:show="embed" xlink:actuate="onLoad" draw:mime-type="image/svg+xml"><text:p/></draw:image><draw:image xlink:href="Pictures/10000001000000930000001BF9E08C22.png" xlink:type="simple" xlink:show="embed" xlink:actuate="onLoad" draw:mime-type="image/png"/><svg:title>TexMaths</svg:title><svg:desc>12§display§x^3 +  3x^2 + 5x + 1 - \frac{2}{x} = 0§svg§600§FALSE§</svg:desc></draw:frame></text:p>
      <text:p text:style-name="P1"/>
      <text:p text:style-name="P1">putting x in evidence again</text:p>
      <text:p text:style-name="P1"/>
      <text:p text:style-name="P2"><draw:frame text:anchor-type="as-char" svg:y="-0.2311in" draw:z-index="5" draw:name="Shape6" draw:style-name="gr1" draw:text-style-name="P3" svg:width="2.1197in" svg:height="0.3516in"><draw:image xlink:href="Pictures/10004F4E00001188000002E7F9435303.svg" xlink:type="simple" xlink:show="embed" xlink:actuate="onLoad" draw:mime-type="image/svg+xml"><text:p/></draw:image><draw:image xlink:href="Pictures/10000001000000A10000001B41077453.png" xlink:type="simple" xlink:show="embed" xlink:actuate="onLoad" draw:mime-type="image/png"/><svg:title>TexMaths</svg:title><svg:desc>12§display§x(x^2 + 3x + 5 + \frac{1}{x} - \frac{2}{x^2}) = 0§svg§600§FALSE§</svg:desc></draw:frame></text:p>
      <text:p text:style-name="P2"/>
      <text:p text:style-name="P4"><draw:frame text:anchor-type="as-char" svg:y="-0.2311in" draw:z-index="6" draw:name="Shape7" draw:style-name="gr1" draw:text-style-name="P3" svg:width="1.9343in" svg:height="0.3516in"><draw:image xlink:href="Pictures/10004AFD00000FFF000002E70087B62B.svg" xlink:type="simple" xlink:show="embed" xlink:actuate="onLoad" draw:mime-type="image/svg+xml"><text:p/></draw:image><draw:image xlink:href="Pictures/10000001000000930000001B95A96E6B.png" xlink:type="simple" xlink:show="embed" xlink:actuate="onLoad" draw:mime-type="image/png"/><svg:title>TexMaths</svg:title><svg:desc>12§display§x^2 + 3x + 5 + \frac{1}{x} - \frac{2}{x^2} = \frac{0}{x}§svg§600§FALSE§</svg:desc></draw:frame></text:p>
      <text:p text:style-name="P4"/>
      <text:p text:style-name="P4">dividing zero by x, on right side.</text:p>
      <text:p text:style-name="P1"/>
      <text:p text:style-name="P5"><text:tab/><text:tab/><text:tab/><text:tab/><text:tab/>Equation 1</text:p>
      <text:p text:style-name="P5"><text:tab/></text:p>
      <text:p text:style-name="P2"><draw:frame text:anchor-type="as-char" svg:y="-0.2311in" draw:z-index="7" draw:name="Shape8" draw:style-name="gr1" draw:text-style-name="P3" svg:width="1.8961in" svg:height="0.3516in"><draw:image xlink:href="Pictures/1000439E00000FAE000002E7A1781E2D.svg" xlink:type="simple" xlink:show="embed" xlink:actuate="onLoad" draw:mime-type="image/svg+xml"><text:p/></draw:image><draw:image xlink:href="Pictures/10000001000000900000001B82325F4C.png" xlink:type="simple" xlink:show="embed" xlink:actuate="onLoad" draw:mime-type="image/png"/><svg:title>TexMaths</svg:title><svg:desc>12§display§x^2 + 3x + 5 + \frac{1}{x} - \frac{2}{x^2} = 0§svg§600§FALSE§</svg:desc></draw:frame></text:p>
      <text:p text:style-name="P1"/>
      <text:p text:style-name="P1"><text:tab/><text:tab/><text:tab/><text:tab/><text:tab/><text:span text:style-name="T4">End</text:span> <text:span text:style-name="T4">Equation 1</text:span></text:p>
      <text:p text:style-name="P1"/>
      <text:p text:style-name="P1">In this, case , we have a parabola formula <text:span text:style-name="T3">(On equation 1)</text:span></text:p>
      <text:p text:style-name="P1"/>
      <text:p text:style-name="P6">Also,</text:p>
      <text:p text:style-name="P1"/>
      <text:p text:style-name="P7"><text:span text:style-name="T5"><draw:frame text:anchor-type="as-char" svg:y="-0.1457in" draw:z-index="8" draw:name="Shape9" draw:style-name="gr1" draw:text-style-name="P3" svg:width="1.6732in" svg:height="0.1606in"><draw:image xlink:href="Pictures/1000403500000DD700000154D3FED508.svg" xlink:type="simple" xlink:show="embed" xlink:actuate="onLoad" draw:mime-type="image/svg+xml"><text:p/></draw:image><draw:image xlink:href="Pictures/100000010000007F0000000CCC9EB07B.png" xlink:type="simple" xlink:show="embed" xlink:actuate="onLoad" draw:mime-type="image/png"/><svg:title>TexMaths</svg:title><svg:desc>12§display§x^4 +3x^3 + 5x^2 + x = 2§svg§600§FALSE§</svg:desc></draw:frame></text:span><text:s/>is a parabola formula because of <text:span text:style-name="T3">equation 1</text:span></text:p>
      <text:p text:style-name="P1"/>
      <text:p text:style-name="P8">To consider</text:p>
      <text:p text:style-name="P8"/>
      <text:p text:style-name="P9">On, a equation, we have A=B...what if we just develop A, and left B alone?</text:p>
      <text:p text:style-name="P9"/>
      <text:p text:style-name="P10">x^5 + 2x^4 + 6x^2 = x+1</text:p>
      <text:p text:style-name="P9"/>
      <text:p text:style-name="P9">keep developing left side, and let rigth<text:span text:style-name="T6">t</text:span> side the same</text:p>
      <text:p text:style-name="P9"><text:soft-page-break/><text:tab/><text:tab/><text:tab/><text:tab/><text:tab/><text:span text:style-name="T7">Example</text:span></text:p>
      <text:p text:style-name="P11"><text:span text:style-name="T5"><draw:frame text:anchor-type="as-char" svg:y="-0.1472in" draw:z-index="9" draw:name="Shape10" draw:style-name="gr1" draw:text-style-name="P3" svg:width="1.5094in" svg:height="0.1614in"><draw:image xlink:href="Pictures/100036F000000C7C00000157C410D874.svg" xlink:type="simple" xlink:show="embed" xlink:actuate="onLoad" draw:mime-type="image/svg+xml"><text:p/></draw:image><draw:image xlink:href="Pictures/10000001000000720000000C8BCCC292.png" xlink:type="simple" xlink:show="embed" xlink:actuate="onLoad" draw:mime-type="image/png"/><svg:title>TexMaths</svg:title><svg:desc>12§display§\(A^{x-1} * C - A^x = B^y\)§svg§600§FALSE§</svg:desc></draw:frame></text:span><text:s text:c="2"/><text:span text:style-name="T8">(1)</text:span></text:p>
      <text:p text:style-name="P12"><text:span text:style-name="T5"><draw:frame text:anchor-type="as-char" svg:y="-0.2291in" draw:z-index="10" draw:name="Shape11" draw:style-name="gr1" draw:text-style-name="P3" svg:width="1.5079in" svg:height="0.348in"><draw:image xlink:href="Pictures/1000358D00000C78000002E3D6578950.svg" xlink:type="simple" xlink:show="embed" xlink:actuate="onLoad" draw:mime-type="image/svg+xml"><text:p/></draw:image><draw:image xlink:href="Pictures/10000001000000720000001A19C25EAE.png" xlink:type="simple" xlink:show="embed" xlink:actuate="onLoad" draw:mime-type="image/png"/><svg:title>TexMaths</svg:title><svg:desc>12§display§\( A^x (\frac{1}{A} * C - 1) = B^y \)§svg§600§FALSE§</svg:desc></draw:frame></text:span><text:s/><text:span text:style-name="T8">(2)</text:span></text:p>
      <text:p text:style-name="P13"><draw:frame text:anchor-type="as-char" svg:y="-0.2327in" draw:z-index="11" draw:name="Shape12" draw:style-name="gr1" draw:text-style-name="P3" svg:width="1.1622in" svg:height="0.4224in"><draw:image xlink:href="Pictures/100034B80000099C0000037DAEAE4C34.svg" xlink:type="simple" xlink:show="embed" xlink:actuate="onLoad" draw:mime-type="image/svg+xml"><text:p/></draw:image><draw:image xlink:href="Pictures/1000000100000058000000209CE8C837.png" xlink:type="simple" xlink:show="embed" xlink:actuate="onLoad" draw:mime-type="image/png"/><svg:title>TexMaths</svg:title><svg:desc>12§display§\(A^x = \frac{B^y}{\frac{C}{A} - 1 } \) (3)§svg§600§FALSE§</svg:desc></draw:frame></text:p>
      <text:p text:style-name="P11"><text:span text:style-name="T5"><draw:frame text:anchor-type="as-char" svg:y="-0.2327in" draw:z-index="12" draw:name="Shape13" draw:style-name="gr1" draw:text-style-name="P3" svg:width="0.7752in" svg:height="0.4224in"><draw:image xlink:href="Pictures/10002A41000006690000037D191F4B2C.svg" xlink:type="simple" xlink:show="embed" xlink:actuate="onLoad" draw:mime-type="image/svg+xml"><text:p/></draw:image><draw:image xlink:href="Pictures/100000010000003B00000020707F72E8.png" xlink:type="simple" xlink:show="embed" xlink:actuate="onLoad" draw:mime-type="image/png"/><svg:title>TexMaths</svg:title><svg:desc>12§display§\( A^x = \frac{B^y}{\frac{C-1}{A}} \)§svg§600§FALSE§</svg:desc></draw:frame></text:span><text:s/><text:span text:style-name="T8">(4)</text:span></text:p>
      <text:p text:style-name="P11"><text:span text:style-name="T5"><draw:frame text:anchor-type="as-char" svg:y="-0.2193in" draw:z-index="13" draw:name="Shape14" draw:style-name="gr1" draw:text-style-name="P3" svg:width="1.1469in" svg:height="0.3433in"><draw:image xlink:href="Pictures/10002EAE0000097C000002D73B2DD220.svg" xlink:type="simple" xlink:show="embed" xlink:actuate="onLoad" draw:mime-type="image/svg+xml"><text:p/></draw:image><draw:image xlink:href="Pictures/10000001000000570000001A5E36C9EC.png" xlink:type="simple" xlink:show="embed" xlink:actuate="onLoad" draw:mime-type="image/png"/><svg:title>TexMaths</svg:title><svg:desc>12§display§\(A^x * A = \frac{B^y}{C-1} \)§svg§600§FALSE§</svg:desc></draw:frame></text:span><text:s/><text:span text:style-name="T8">(5)</text:span></text:p>
      <text:p text:style-name="P11"><text:span text:style-name="T5"><draw:frame text:anchor-type="as-char" svg:y="-0.1236in" draw:z-index="14" draw:name="Shape15" draw:style-name="gr1" draw:text-style-name="P3" svg:width="1.613in" svg:height="0.1657in"><draw:image xlink:href="Pictures/100038C500000D560000015F8407326E.svg" xlink:type="simple" xlink:show="embed" xlink:actuate="onLoad" draw:mime-type="image/svg+xml"><text:p/></draw:image><draw:image xlink:href="Pictures/100000010000007A0000000DAD0FC76F.png" xlink:type="simple" xlink:show="embed" xlink:actuate="onLoad" draw:mime-type="image/png"/><svg:title>TexMaths</svg:title><svg:desc>12§display§\( A^x * A * (C-1) = B^y \)§svg§600§FALSE§</svg:desc></draw:frame></text:span><text:s/><text:span text:style-name="T8">(6)</text:span></text:p>
      <text:p text:style-name="P14"/>
      <text:p text:style-name="P15">So, we can solve the equation by solving 1,2 and 6...no need extra arithmetic. (steps 3,4 and 5<text:span text:style-name="T9">).</text:span></text:p>
      <text:p text:style-name="P15"/>
      <text:p text:style-name="P15"/>
      <text:p text:style-name="P15"/>
      <text:p text:style-name="P14"/>
      <text:p text:style-name="P14"/>
      <text:p text:style-name="P16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7:51:58.016261764</meta:creation-date>
    <dc:date>2026-07-01T14:31:56.584792189</dc:date>
    <meta:editing-duration>PT1H3M23S</meta:editing-duration>
    <meta:editing-cycles>17</meta:editing-cycles>
    <meta:generator>LibreOffice/26.2.3.2$Linux_X86_64 LibreOffice_project/70e089b17412e4cb7773e41413306b17a2328c34</meta:generator>
    <meta:document-statistic meta:table-count="0" meta:image-count="0" meta:object-count="0" meta:page-count="3" meta:paragraph-count="33" meta:word-count="124" meta:character-count="647" meta:non-whitespace-character-count="518"/>
  </office:meta>
</office:document-meta>
</file>