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26c960" officeooo:paragraph-rsid="002006af"/>
    </style:style>
    <style:style style:name="P2" style:family="paragraph" style:parent-style-name="Standard">
      <style:text-properties officeooo:rsid="002b2af9" officeooo:paragraph-rsid="00208773"/>
    </style:style>
    <style:style style:name="P3" style:family="paragraph" style:parent-style-name="Standard">
      <style:text-properties style:text-position="0% 100%" officeooo:rsid="0028c117" officeooo:paragraph-rsid="001e1e8e"/>
    </style:style>
    <style:style style:name="P4" style:family="paragraph" style:parent-style-name="Standard">
      <style:text-properties style:text-position="0% 100%" officeooo:rsid="0025c0b5" officeooo:paragraph-rsid="001e1e8e"/>
    </style:style>
    <style:style style:name="P5" style:family="paragraph" style:parent-style-name="Standard">
      <style:text-properties officeooo:paragraph-rsid="001e1e8e"/>
    </style:style>
    <style:style style:name="P6" style:family="paragraph" style:parent-style-name="Standard">
      <style:text-properties officeooo:rsid="0028c117" officeooo:paragraph-rsid="001e1e8e"/>
    </style:style>
    <style:style style:name="P7" style:family="paragraph" style:parent-style-name="Standard">
      <style:text-properties officeooo:rsid="002b06bd" officeooo:paragraph-rsid="001e1e8e"/>
    </style:style>
    <style:style style:name="P8" style:family="paragraph" style:parent-style-name="Standard">
      <style:text-properties officeooo:rsid="001e1e8e" officeooo:paragraph-rsid="001e1e8e"/>
    </style:style>
    <style:style style:name="P9" style:family="paragraph" style:parent-style-name="Standard">
      <style:text-properties officeooo:paragraph-rsid="00208773"/>
    </style:style>
    <style:style style:name="P10" style:family="paragraph" style:parent-style-name="Standard">
      <style:text-properties style:text-position="0% 100%" officeooo:rsid="0028c117" officeooo:paragraph-rsid="00208773"/>
    </style:style>
    <style:style style:name="P11" style:family="paragraph" style:parent-style-name="Standard">
      <style:text-properties style:text-position="0% 100%" officeooo:rsid="002b885f" officeooo:paragraph-rsid="00208773"/>
    </style:style>
    <style:style style:name="P12" style:family="paragraph" style:parent-style-name="Standard">
      <style:text-properties style:text-position="0% 100%" officeooo:rsid="002b5126" officeooo:paragraph-rsid="00208773"/>
    </style:style>
    <style:style style:name="P13" style:family="paragraph" style:parent-style-name="Standard">
      <style:text-properties style:text-position="0% 100%" officeooo:rsid="00208773" officeooo:paragraph-rsid="00208773"/>
    </style:style>
    <style:style style:name="T1" style:family="text">
      <style:text-properties officeooo:rsid="0026c960"/>
    </style:style>
    <style:style style:name="T2" style:family="text">
      <style:text-properties style:text-position="0% 100%" officeooo:rsid="0028c117"/>
    </style:style>
    <style:style style:name="T3" style:family="text">
      <style:text-properties officeooo:rsid="0028c117"/>
    </style:style>
    <style:style style:name="T4" style:family="text">
      <style:text-properties officeooo:rsid="001e1e8e"/>
    </style:style>
    <style:style style:name="T5" style:family="text">
      <style:text-properties officeooo:rsid="00208773"/>
    </style:style>
    <style:style style:name="T6" style:family="text">
      <style:text-properties officeooo:rsid="0025c0b5"/>
    </style:style>
    <style:style style:name="T7" style:family="text">
      <style:text-properties style:text-position="0% 100%" officeooo:rsid="002b885f"/>
    </style:style>
    <style:style style:name="T8" style:family="text">
      <style:text-properties officeooo:rsid="002d7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mposite, number, has at least two prime factors.</text:p>
      <text:p text:style-name="P1"/>
      <text:p text:style-name="P2">If they have 4 factors, two of them must be prime</text:p>
      <text:p text:style-name="P1"/>
      <text:p text:style-name="P3"/>
      <text:p text:style-name="P3">All 4 factors</text:p>
      <text:p text:style-name="P3"/>
      <text:p text:style-name="P4">55 = [1, 5, 11, 55] <text:s/>… <text:span text:style-name="T1">4 factors</text:span></text:p>
      <text:p text:style-name="P4"/>
      <text:p text:style-name="P5"><text:span text:style-name="T2">77 = [</text:span>1, 7, 11, 77<text:span text:style-name="T3">]</text:span></text:p>
      <text:p text:style-name="P5"/>
      <text:p text:style-name="P6">15 = [1,3,5,15]</text:p>
      <text:p text:style-name="P7"/>
      <text:p text:style-name="P7">10 = [1,2,5,10]</text:p>
      <text:p text:style-name="P7"/>
      <text:p text:style-name="P7"/>
      <text:p text:style-name="P8">If a divisor belongs, to a number, the divisors of that number, are also divisors of the number. E.G</text:p>
      <text:p text:style-name="P8"/>
      <text:p text:style-name="P8">12 = [1,2,3,6,12]</text:p>
      <text:p text:style-name="P8"/>
      <text:p text:style-name="P5"><text:span text:style-name="T4">24 = [</text:span>1, 2, 3, 4, 6, 8, 12, 24<text:span text:style-name="T4">]</text:span></text:p>
      <text:p text:style-name="P5"/>
      <text:p text:style-name="P9"><text:span text:style-name="T4">As we can see 24, has divisors 2,3,6 and 12, </text:span><text:span text:style-name="T5">same as 12…</text:span></text:p>
      <text:p text:style-name="P9"/>
      <text:p text:style-name="P10">What are the numbers, that only have itself, and one, and two different prime factors? </text:p>
      <text:p text:style-name="P10"/>
      <text:p text:style-name="P11">A lot…Here are some…</text:p>
      <text:p text:style-name="P11"/>
      <text:p text:style-name="P11">6 <text:s text:c="2"/>8 <text:s text:c="2"/>10 <text:s text:c="2"/>14 <text:s text:c="2"/>15 <text:s text:c="2"/>21 <text:s text:c="2"/>22 <text:s text:c="2"/>26 <text:s text:c="2"/>27 <text:s text:c="2"/>33 <text:s text:c="2"/>34 <text:s text:c="2"/>35 <text:s text:c="2"/>38 <text:s text:c="2"/>39 <text:s text:c="2"/>46 <text:s text:c="2"/>51 <text:s text:c="2"/>55 <text:s text:c="2"/>57 <text:s text:c="2"/>58 <text:s text:c="2"/>62 <text:s text:c="2"/>65 <text:s text:c="2"/>69</text:p>
      <text:p text:style-name="P10"/>
      <text:p text:style-name="P10"/>
      <text:p text:style-name="P12">If, number has bigger than 4 factors, for example include 55...It will inherit all numbers from it, and inherit the two primes, meaning same prime factorization…</text:p>
      <text:p text:style-name="P12"/>
      <text:p text:style-name="P11">E.G</text:p>
      <text:p text:style-name="P11"/>
      <text:p text:style-name="P11"/>
      <text:p text:style-name="P11">2*55 = 110</text:p>
      <text:p text:style-name="P11"/>
      <text:p text:style-name="P13">55 = <text:span text:style-name="T6">[1, 5, 11, 55] <text:s/>...</text:span></text:p>
      <text:p text:style-name="P11"/>
      <text:p text:style-name="P9"><text:span text:style-name="T7">110 = [</text:span>1, 2, 5, 10, 11, 22, 55, 110<text:span text:style-name="T8">] , </text:span><text:span text:style-name="T5">contains same prime divisors of 55...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6:22:45.021980056</meta:creation-date>
    <dc:date>2026-04-13T16:25:29.776783629</dc:date>
    <meta:editing-duration>PT2M44S</meta:editing-duration>
    <meta:editing-cycles>3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19" meta:word-count="184" meta:character-count="886" meta:non-whitespace-character-count="675"/>
  </office:meta>
</office:document-meta>
</file>