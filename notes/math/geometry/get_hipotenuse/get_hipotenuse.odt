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800000020E0DC3D44.png" manifest:media-type="image/png"/>
  <manifest:file-entry manifest:full-path="Pictures/10007F2E0000194300000376B6A7825F.svg" manifest:media-type="image/svg+xml"/>
  <manifest:file-entry manifest:full-path="Pictures/100036BF00000A910000031B19B346A5.svg" manifest:media-type="image/svg+xml"/>
  <manifest:file-entry manifest:full-path="Pictures/10003317000009700000033FF4200F08.svg" manifest:media-type="image/svg+xml"/>
  <manifest:file-entry manifest:full-path="Pictures/10000001000000D10000001C72E6CED9.png" manifest:media-type="image/png"/>
  <manifest:file-entry manifest:full-path="Pictures/10003B9E00000B6C000003397AB840DA.svg" manifest:media-type="image/svg+xml"/>
  <manifest:file-entry manifest:full-path="Pictures/1000000100000033000000098BBB8593.png" manifest:media-type="image/png"/>
  <manifest:file-entry manifest:full-path="Pictures/1000160300000596000000F45DAA385D.svg" manifest:media-type="image/svg+xml"/>
  <manifest:file-entry manifest:full-path="Pictures/1000094D000002330000017A87E08F53.svg" manifest:media-type="image/svg+xml"/>
  <manifest:file-entry manifest:full-path="Pictures/10000001000000CE0000001E6ED67534.png" manifest:media-type="image/png"/>
  <manifest:file-entry manifest:full-path="Pictures/100000010000003A0000000D7F261015.png" manifest:media-type="image/png"/>
  <manifest:file-entry manifest:full-path="Pictures/10000001000000300000001EF0BA3C1A.png" manifest:media-type="image/png"/>
  <manifest:file-entry manifest:full-path="Pictures/10000001000000640000000C60388EF0.png" manifest:media-type="image/png"/>
  <manifest:file-entry manifest:full-path="Pictures/10004BE400000B0A0000033E8FD065EE.svg" manifest:media-type="image/svg+xml"/>
  <manifest:file-entry manifest:full-path="Pictures/10000001000000BF0000000FF9E5DFED.png" manifest:media-type="image/png"/>
  <manifest:file-entry manifest:full-path="Pictures/1000534800000F3C000001441A89FE52.svg" manifest:media-type="image/svg+xml"/>
  <manifest:file-entry manifest:full-path="Pictures/10001A48000006510000015F026F7CB5.svg" manifest:media-type="image/svg+xml"/>
  <manifest:file-entry manifest:full-path="Pictures/100018460000052F0000033F578CBF0B.svg" manifest:media-type="image/svg+xml"/>
  <manifest:file-entry manifest:full-path="Pictures/10006CE7000014DB0000019FFF813250.svg" manifest:media-type="image/svg+xml"/>
  <manifest:file-entry manifest:full-path="Pictures/10003A1700000AE2000001444DDD6341.svg" manifest:media-type="image/svg+xml"/>
  <manifest:file-entry manifest:full-path="Pictures/10006E99000016C30000031B6A97986F.svg" manifest:media-type="image/svg+xml"/>
  <manifest:file-entry manifest:full-path="Pictures/10000001000000D00000000DDB327386.png" manifest:media-type="image/png"/>
  <manifest:file-entry manifest:full-path="Pictures/100038D900000A4B0000034CFA1A0C5D.svg" manifest:media-type="image/svg+xml"/>
  <manifest:file-entry manifest:full-path="Pictures/10000001000000610000001CD9689F4A.png" manifest:media-type="image/png"/>
  <manifest:file-entry manifest:full-path="Pictures/10000001000000140000000ED8BF0C70.png" manifest:media-type="image/png"/>
  <manifest:file-entry manifest:full-path="Pictures/100000010000005E0000001E5A0EC37C.png" manifest:media-type="image/png"/>
  <manifest:file-entry manifest:full-path="Pictures/100000010000008C0000000C8294C88F.png" manifest:media-type="image/png"/>
  <manifest:file-entry manifest:full-path="Pictures/100031CC0000081100000343DC673E6E.svg" manifest:media-type="image/svg+xml"/>
  <manifest:file-entry manifest:full-path="Pictures/10000001000000450000001DF61DE2E2.png" manifest:media-type="image/png"/>
  <manifest:file-entry manifest:full-path="Pictures/1000508600000ED90000014467D0F0B9.svg" manifest:media-type="image/svg+xml"/>
  <manifest:file-entry manifest:full-path="Pictures/10000001000000880000000C37A0B2A4.png" manifest:media-type="image/png"/>
  <manifest:file-entry manifest:full-path="Pictures/100074EE000016700000033F68DEA374.svg" manifest:media-type="image/svg+xml"/>
  <manifest:file-entry manifest:full-path="Pictures/10000001000000570000001E4AB7B6FB.png" manifest:media-type="image/png"/>
  <manifest:file-entry manifest:full-path="Pictures/10000001000000690000001E9A3D3433.png" manifest:media-type="image/png"/>
  <manifest:file-entry manifest:full-path="Pictures/100000010000004A0000001E3E41B064.png" manifest:media-type="image/png"/>
  <manifest:file-entry manifest:full-path="Pictures/10002C880000078000000325C331A6A3.svg" manifest:media-type="image/svg+xml"/>
  <manifest:file-entry manifest:full-path="Pictures/10000001000002B8000002CBD32C83C7.png" manifest:media-type="image/png"/>
  <manifest:file-entry manifest:full-path="Pictures/10000001000000650000001E6850C831.png" manifest:media-type="image/png"/>
  <manifest:file-entry manifest:full-path="Pictures/100077F3000016AA0000015E701793B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32fae4"/>
    </style:style>
    <style:style style:name="P3" style:family="paragraph" style:parent-style-name="Standard">
      <style:paragraph-properties fo:text-align="left" style:justify-single-word="false"/>
      <style:text-properties officeooo:paragraph-rsid="0032fae4"/>
    </style:style>
    <style:style style:name="P4" style:family="paragraph" style:parent-style-name="Standard">
      <style:paragraph-properties fo:text-align="left" style:justify-single-word="false"/>
      <style:text-properties fo:color="#000000" loext:opacity="100%"/>
    </style:style>
    <style:style style:name="P5" style:family="paragraph" style:parent-style-name="Standard">
      <style:text-properties style:text-position="0% 100%" officeooo:paragraph-rsid="003377dc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Standard">
      <style:text-properties officeooo:paragraph-rsid="003377dc"/>
    </style:style>
    <style:style style:name="P8" style:family="paragraph" style:parent-style-name="Standard">
      <style:text-properties officeooo:rsid="003377dc" officeooo:paragraph-rsid="0034f6df"/>
    </style:style>
    <style:style style:name="P9" style:family="paragraph" style:parent-style-name="Standard">
      <style:text-properties officeooo:rsid="003377dc" officeooo:paragraph-rsid="003377dc"/>
    </style:style>
    <style:style style:name="P10" style:family="paragraph" style:parent-style-name="Standard">
      <style:text-properties style:text-position="0% 100%" officeooo:paragraph-rsid="0034f6df"/>
    </style:style>
    <style:style style:name="P11" style:family="paragraph" style:parent-style-name="Standard">
      <style:text-properties officeooo:rsid="0034f6df" officeooo:paragraph-rsid="0034f6df"/>
    </style:style>
    <style:style style:name="P12" style:family="paragraph" style:parent-style-name="Standard">
      <style:text-properties fo:color="#f10d0c" loext:opacity="100%" officeooo:rsid="0034f6df"/>
    </style:style>
    <style:style style:name="P13" style:family="paragraph" style:parent-style-name="Standard">
      <style:text-properties officeooo:paragraph-rsid="003603bb"/>
    </style:style>
    <style:style style:name="P14" style:family="paragraph" style:parent-style-name="Standard">
      <style:text-properties officeooo:paragraph-rsid="0034f6df"/>
    </style:style>
    <style:style style:name="P15" style:family="paragraph" style:parent-style-name="Standard">
      <style:text-properties style:text-position="0% 100%" officeooo:paragraph-rsid="003603bb"/>
    </style:style>
    <style:style style:name="T1" style:family="text">
      <style:text-properties fo:color="#f10d0c" loext:opacity="100%"/>
    </style:style>
    <style:style style:name="T2" style:family="text">
      <style:text-properties officeooo:rsid="003377dc"/>
    </style:style>
    <style:style style:name="T3" style:family="text">
      <style:text-properties style:text-position="0% 100%"/>
    </style:style>
    <style:style style:name="T4" style:family="text">
      <style:text-properties fo:color="#f10d0c" loext:opacity="100%" style:text-position="0% 100%"/>
    </style:style>
    <style:style style:name="T5" style:family="text">
      <style:text-properties officeooo:rsid="003603bb"/>
    </style:style>
    <style:style style:name="T6" style:family="text">
      <style:text-properties fo:color="#f10d0c" loext:opacity="100%" officeooo:rsid="003603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3193in" svg:height="2.3835in" draw:z-index="0"><draw:image xlink:href="Pictures/10000001000002B8000002CBD32C83C7.png" xlink:type="simple" xlink:show="embed" xlink:actuate="onLoad" draw:mime-type="image/png"/></draw:frame></text:p>
      <text:p text:style-name="P1"/>
      <text:p text:style-name="P1"/>
      <text:p text:style-name="P2">On picture A.</text:p>
      <text:p text:style-name="P2">H = s . Its a circle chord</text:p>
      <text:p text:style-name="P2">D = d. Red line on picture A</text:p>
      <text:p text:style-name="P3">R = radius</text:p>
      <text:p text:style-name="P1"/>
      <text:p text:style-name="Standard"><text:tab/><text:tab/><text:tab/><text:tab/><text:tab/><text:span text:style-name="T1">new formula for hipotenuse</text:span></text:p>
      <text:p text:style-name="Standard"/>
      <text:p text:style-name="Standard"/>
      <text:p text:style-name="P4">Math formula for diagonal of square</text:p>
      <text:p text:style-name="Standard"/>
      <text:p text:style-name="P5"><draw:frame text:anchor-type="as-char" svg:y="-0.1516in" draw:z-index="1" draw:name="Shape1" draw:style-name="gr1" draw:text-style-name="P6" svg:width="0.7634in" svg:height="0.1657in"><draw:image xlink:href="Pictures/10001A48000006510000015F026F7CB5.svg" xlink:type="simple" xlink:show="embed" xlink:actuate="onLoad" draw:mime-type="image/svg+xml"><text:p/></draw:image><draw:image xlink:href="Pictures/100000010000003A0000000D7F261015.png" xlink:type="simple" xlink:show="embed" xlink:actuate="onLoad" draw:mime-type="image/png"/><svg:title>TexMaths</svg:title><svg:desc>12§display§\(d = s * \sqrt{2}\)§svg§600§FALSE§</svg:desc></draw:frame><text:tab/><text:tab/><text:span text:style-name="T2">(1)</text:span></text:p>
      <text:p text:style-name="Standard"/>
      <text:p text:style-name="Standard">d = diagonal of square </text:p>
      <text:p text:style-name="Standard">s = side of square</text:p>
      <text:p text:style-name="Standard"/>
      <text:p text:style-name="P7">H is hipotenuse <text:span text:style-name="T2">(and chord)</text:span></text:p>
      <text:p text:style-name="P7"/>
      <text:p text:style-name="P8">Using math formula, (1) above, dividing all sides by <text:span text:style-name="T3"><draw:frame text:anchor-type="as-char" svg:y="-0.1638in" draw:z-index="2" draw:name="Shape2" draw:style-name="gr1" draw:text-style-name="P6" svg:width="0.2661in" svg:height="0.178in"><draw:image xlink:href="Pictures/1000094D000002330000017A87E08F53.svg" xlink:type="simple" xlink:show="embed" xlink:actuate="onLoad" draw:mime-type="image/svg+xml"><text:p/></draw:image><draw:image xlink:href="Pictures/10000001000000140000000ED8BF0C70.png" xlink:type="simple" xlink:show="embed" xlink:actuate="onLoad" draw:mime-type="image/png"/><svg:title>TexMaths</svg:title><svg:desc>12§display§\(\sqrt{2}.\)§svg§600§FALSE§</svg:desc></draw:frame></text:span></text:p>
      <text:p text:style-name="P9"/>
      <text:p text:style-name="P9">We get</text:p>
      <text:p text:style-name="P7"/>
      <text:p text:style-name="P10"><draw:frame text:anchor-type="as-char" svg:y="-0.2335in" draw:z-index="3" draw:name="Shape3" draw:style-name="gr1" draw:text-style-name="P6" svg:width="0.6268in" svg:height="0.3925in"><draw:image xlink:href="Pictures/100018460000052F0000033F578CBF0B.svg" xlink:type="simple" xlink:show="embed" xlink:actuate="onLoad" draw:mime-type="image/svg+xml"><text:p/></draw:image><draw:image xlink:href="Pictures/10000001000000300000001EF0BA3C1A.png" xlink:type="simple" xlink:show="embed" xlink:actuate="onLoad" draw:mime-type="image/png"/><svg:title>TexMaths</svg:title><svg:desc>12§display§\(H  =  \frac{\text{D}}{\sqrt{2}} \)§svg§600§FALSE§</svg:desc></draw:frame></text:p>
      <text:p text:style-name="Standard"/>
      <text:p text:style-name="P11">D, the diameter , is 2*radius so</text:p>
      <text:p text:style-name="P10"/>
      <text:p text:style-name="P10"><draw:frame text:anchor-type="as-char" svg:y="-0.1154in" draw:z-index="4" draw:name="Shape4" draw:style-name="gr1" draw:text-style-name="P6" svg:width="0.6752in" svg:height="0.1157in"><draw:image xlink:href="Pictures/1000160300000596000000F45DAA385D.svg" xlink:type="simple" xlink:show="embed" xlink:actuate="onLoad" draw:mime-type="image/svg+xml"><text:p/></draw:image><draw:image xlink:href="Pictures/1000000100000033000000098BBB8593.png" xlink:type="simple" xlink:show="embed" xlink:actuate="onLoad" draw:mime-type="image/png"/><svg:title>TexMaths</svg:title><svg:desc>12§display§\(D = 2*r\)§svg§600§FALSE§</svg:desc></draw:frame></text:p>
      <text:p text:style-name="P10"/>
      <text:p text:style-name="P12"><text:tab/><text:tab/><text:tab/><text:tab/>Final formula for hipotenuse</text:p>
      <text:p text:style-name="P12"/>
      <text:p text:style-name="P13"><text:span text:style-name="T3"><text:tab/><text:tab/><text:tab/><text:tab/> <text:s text:c="8"/></text:span><text:span text:style-name="T4"><draw:frame text:anchor-type="as-char" svg:y="-0.2283in" draw:z-index="5" draw:name="Shape5" draw:style-name="gr1" draw:text-style-name="P6" svg:width="1.3815in" svg:height="0.3898in"><draw:image xlink:href="Pictures/10003B9E00000B6C000003397AB840DA.svg" xlink:type="simple" xlink:show="embed" xlink:actuate="onLoad" draw:mime-type="image/svg+xml"><text:p/></draw:image><draw:image xlink:href="Pictures/10000001000000690000001E9A3D3433.png" xlink:type="simple" xlink:show="embed" xlink:actuate="onLoad" draw:mime-type="image/png"/><svg:title>TexMaths</svg:title><svg:desc>12§display§\(\text{Hipotenuse} = \frac{2*r}{\sqrt{2}}\)§svg§600§FALSE§</svg:desc></draw:frame></text:span><text:span text:style-name="T1"><text:s/></text:span></text:p>
      <text:p text:style-name="P14"/>
      <text:p text:style-name="P14">r is the base of triangle</text:p>
      <text:p text:style-name="Standard"/>
      <text:p text:style-name="Standard"/>
      <text:p text:style-name="Standard"><text:tab/><text:tab/><text:tab/><text:tab/><text:tab/><text:span text:style-name="T5">Other considerations</text:span></text:p>
      <text:p text:style-name="Standard"/>
      <text:p text:style-name="P13"><text:soft-page-break/><text:tab/><text:tab/><text:tab/><text:tab/><text:tab/><text:span text:style-name="T1">new formula for radius</text:span></text:p>
      <text:p text:style-name="Standard"/>
      <text:p text:style-name="Standard"/>
      <text:p text:style-name="P13">side of square is H <text:span text:style-name="T5">(check above picture)</text:span>.</text:p>
      <text:p text:style-name="Standard"/>
      <text:p text:style-name="Standard">using pythagoras</text:p>
      <text:p text:style-name="Standard"/>
      <text:p text:style-name="P15"><draw:frame text:anchor-type="as-char" svg:y="-0.161in" draw:z-index="6" draw:name="Shape6" draw:style-name="gr1" draw:text-style-name="P6" svg:width="2.5224in" svg:height="0.1961in"><draw:image xlink:href="Pictures/10006CE7000014DB0000019FFF813250.svg" xlink:type="simple" xlink:show="embed" xlink:actuate="onLoad" draw:mime-type="image/svg+xml"><text:p/></draw:image><draw:image xlink:href="Pictures/10000001000000BF0000000FF9E5DFED.png" xlink:type="simple" xlink:show="embed" xlink:actuate="onLoad" draw:mime-type="image/png"/><svg:title>TexMaths</svg:title><svg:desc>12§display§\text{radius}^2 + \text{radius}^2 = \text{side of square}^2§svg§600§FALSE§</svg:desc></draw:frame></text:p>
      <text:p text:style-name="Standard"/>
      <text:p text:style-name="P15"><draw:frame text:anchor-type="as-char" svg:y="-0.1528in" draw:z-index="7" draw:name="Shape7" draw:style-name="gr1" draw:text-style-name="P6" svg:width="1.3161in" svg:height="0.1531in"><draw:image xlink:href="Pictures/10003A1700000AE2000001444DDD6341.svg" xlink:type="simple" xlink:show="embed" xlink:actuate="onLoad" draw:mime-type="image/svg+xml"><text:p/></draw:image><draw:image xlink:href="Pictures/10000001000000640000000C60388EF0.png" xlink:type="simple" xlink:show="embed" xlink:actuate="onLoad" draw:mime-type="image/png"/><svg:title>TexMaths</svg:title><svg:desc>12§display§\(2 * \text{radius}^2 = \text{side}^2\)§svg§600§FALSE§</svg:desc></draw:frame></text:p>
      <text:p text:style-name="Standard"/>
      <text:p text:style-name="P15"><draw:frame text:anchor-type="as-char" svg:y="-0.278in" draw:z-index="8" draw:name="Shape8" draw:style-name="gr1" draw:text-style-name="P6" svg:width="1.2441in" svg:height="0.3988in"><draw:image xlink:href="Pictures/100038D900000A4B0000034CFA1A0C5D.svg" xlink:type="simple" xlink:show="embed" xlink:actuate="onLoad" draw:mime-type="image/svg+xml"><text:p/></draw:image><draw:image xlink:href="Pictures/100000010000005E0000001E5A0EC37C.png" xlink:type="simple" xlink:show="embed" xlink:actuate="onLoad" draw:mime-type="image/png"/><svg:title>TexMaths</svg:title><svg:desc>12§display§\(\text{radius} =  \sqrt{\frac{side^2}{2}}\)§svg§600§FALSE§</svg:desc></draw:frame></text:p>
      <text:p text:style-name="Standard"/>
      <text:p text:style-name="P15"><draw:frame text:anchor-type="as-char" svg:y="-0.2346in" draw:z-index="9" draw:name="Shape9" draw:style-name="gr1" draw:text-style-name="P6" svg:width="0.9752in" svg:height="0.3941in"><draw:image xlink:href="Pictures/100031CC0000081100000343DC673E6E.svg" xlink:type="simple" xlink:show="embed" xlink:actuate="onLoad" draw:mime-type="image/svg+xml"><text:p/></draw:image><draw:image xlink:href="Pictures/100000010000004A0000001E3E41B064.png" xlink:type="simple" xlink:show="embed" xlink:actuate="onLoad" draw:mime-type="image/png"/><svg:title>TexMaths</svg:title><svg:desc>12§display§\text{radius} = \frac{\text{side}}{\sqrt{2}}§svg§600§FALSE§</svg:desc></draw:frame></text:p>
      <text:p text:style-name="Standard"/>
      <text:p text:style-name="P15"><draw:frame text:anchor-type="as-char" svg:y="-0.2256in" draw:z-index="10" draw:name="Shape10" draw:style-name="gr1" draw:text-style-name="P6" svg:width="0.9071in" svg:height="0.3803in"><draw:image xlink:href="Pictures/10002C880000078000000325C331A6A3.svg" xlink:type="simple" xlink:show="embed" xlink:actuate="onLoad" draw:mime-type="image/svg+xml"><text:p/></draw:image><draw:image xlink:href="Pictures/10000001000000450000001DF61DE2E2.png" xlink:type="simple" xlink:show="embed" xlink:actuate="onLoad" draw:mime-type="image/png"/><svg:title>TexMaths</svg:title><svg:desc>12§display§\text{radius} = \frac{H}{\sqrt{2}}§svg§600§FALSE§</svg:desc></draw:frame></text:p>
      <text:p text:style-name="Standard"/>
      <text:p text:style-name="Standard"><text:tab/><text:tab/><text:tab/><text:tab/><text:span text:style-name="T1">other formula for radius</text:span></text:p>
      <text:p text:style-name="Standard"/>
      <text:p text:style-name="Standard"><draw:frame text:anchor-type="as-char" svg:y="-0.1508in" draw:z-index="11" draw:name="Shape11" draw:style-name="gr1" draw:text-style-name="P6" svg:width="2.7406in" svg:height="0.1657in"><draw:image xlink:href="Pictures/100077F3000016AA0000015E701793BC.svg" xlink:type="simple" xlink:show="embed" xlink:actuate="onLoad" draw:mime-type="image/svg+xml"><text:p/></draw:image><draw:image xlink:href="Pictures/10000001000000D00000000DDB327386.png" xlink:type="simple" xlink:show="embed" xlink:actuate="onLoad" draw:mime-type="image/png"/><svg:title>TexMaths</svg:title><svg:desc>12§display§\text{radius}^2 + \text{radius}^2 = 2 * \text{radius} * \text{radius}§svg§600§FALSE§</svg:desc></draw:frame></text:p>
      <text:p text:style-name="Standard"/>
      <text:p text:style-name="P15"><draw:frame text:anchor-type="as-char" svg:y="-0.1528in" draw:z-index="12" draw:name="Shape12" draw:style-name="gr1" draw:text-style-name="P6" svg:width="1.8421in" svg:height="0.1531in"><draw:image xlink:href="Pictures/1000534800000F3C000001441A89FE52.svg" xlink:type="simple" xlink:show="embed" xlink:actuate="onLoad" draw:mime-type="image/svg+xml"><text:p/></draw:image><draw:image xlink:href="Pictures/100000010000008C0000000C8294C88F.png" xlink:type="simple" xlink:show="embed" xlink:actuate="onLoad" draw:mime-type="image/png"/><svg:title>TexMaths</svg:title><svg:desc>12§display§2*\text{radius} * \text{radius} = \text{side}^2§svg§600§FALSE§</svg:desc></draw:frame></text:p>
      <text:p text:style-name="Standard"/>
      <text:p text:style-name="P15"><draw:frame text:anchor-type="as-char" svg:y="-0.1528in" draw:z-index="13" draw:name="Shape13" draw:style-name="gr1" draw:text-style-name="P6" svg:width="1.7953in" svg:height="0.1531in"><draw:image xlink:href="Pictures/1000508600000ED90000014467D0F0B9.svg" xlink:type="simple" xlink:show="embed" xlink:actuate="onLoad" draw:mime-type="image/svg+xml"><text:p/></draw:image><draw:image xlink:href="Pictures/10000001000000880000000C37A0B2A4.png" xlink:type="simple" xlink:show="embed" xlink:actuate="onLoad" draw:mime-type="image/png"/><svg:title>TexMaths</svg:title><svg:desc>12§display§\text{diameter} * \text{radius}  = \text{side}^2}§svg§600§FALSE§</svg:desc></draw:frame></text:p>
      <text:p text:style-name="Standard"/>
      <text:p text:style-name="P15"><draw:frame text:anchor-type="as-char" svg:y="-0.2728in" draw:z-index="14" draw:name="Shape14" draw:style-name="gr1" draw:text-style-name="P6" svg:width="1.335in" svg:height="0.3921in"><draw:image xlink:href="Pictures/10004BE400000B0A0000033E8FD065EE.svg" xlink:type="simple" xlink:show="embed" xlink:actuate="onLoad" draw:mime-type="image/svg+xml"><text:p/></draw:image><draw:image xlink:href="Pictures/10000001000000650000001E6850C831.png" xlink:type="simple" xlink:show="embed" xlink:actuate="onLoad" draw:mime-type="image/png"/><svg:title>TexMaths</svg:title><svg:desc>12§display§\text{radius} = \frac{\text{side}^2}{\text{diameter}}§svg§600§FALSE§</svg:desc></draw:frame></text:p>
      <text:p text:style-name="Standard"/>
      <text:p text:style-name="P13"><text:tab/><text:tab/><text:tab/><text:tab/><text:span text:style-name="T6">n</text:span><text:span text:style-name="T1">ew formula for area </text:span><text:span text:style-name="T6">of circle</text:span></text:p>
      <text:p text:style-name="P13"/>
      <text:p text:style-name="P13">considering new radius formula <text:span text:style-name="T5">(</text:span>r was calculated before<text:span text:style-name="T5">).</text:span></text:p>
      <text:p text:style-name="Standard"/>
      <text:p text:style-name="P15"><draw:frame text:anchor-type="as-char" svg:y="-0.2335in" draw:z-index="15" draw:name="Shape15" draw:style-name="gr1" draw:text-style-name="P6" svg:width="1.1413in" svg:height="0.3925in"><draw:image xlink:href="Pictures/10003317000009700000033FF4200F08.svg" xlink:type="simple" xlink:show="embed" xlink:actuate="onLoad" draw:mime-type="image/svg+xml"><text:p/></draw:image><draw:image xlink:href="Pictures/10000001000000570000001E4AB7B6FB.png" xlink:type="simple" xlink:show="embed" xlink:actuate="onLoad" draw:mime-type="image/png"/><svg:title>TexMaths</svg:title><svg:desc>12§display§r = \frac{\text{Hipotenuse}}{\sqrt{2}}§svg§600§FALSE§</svg:desc></draw:frame></text:p>
      <text:p text:style-name="Standard"/>
      <text:p text:style-name="Standard">square r</text:p>
      <text:p text:style-name="Standard"/>
      <text:p text:style-name="P15"><draw:frame text:anchor-type="as-char" svg:y="-0.2602in" draw:z-index="16" draw:name="Shape16" draw:style-name="gr1" draw:text-style-name="P6" svg:width="1.278in" svg:height="0.3752in"><draw:image xlink:href="Pictures/100036BF00000A910000031B19B346A5.svg" xlink:type="simple" xlink:show="embed" xlink:actuate="onLoad" draw:mime-type="image/svg+xml"><text:p/></draw:image><draw:image xlink:href="Pictures/10000001000000610000001CD9689F4A.png" xlink:type="simple" xlink:show="embed" xlink:actuate="onLoad" draw:mime-type="image/png"/><svg:title>TexMaths</svg:title><svg:desc>12§display§r^2  = \frac{\text{Hipotenuse}^2}{2}§svg§600§FALSE§</svg:desc></draw:frame></text:p>
      <text:p text:style-name="P15"/>
      <text:p text:style-name="P15"><draw:frame text:anchor-type="as-char" svg:y="-0.2602in" draw:z-index="17" draw:name="Shape17" draw:style-name="gr1" draw:text-style-name="P6" svg:width="2.7524in" svg:height="0.3752in"><draw:image xlink:href="Pictures/10006E99000016C30000031B6A97986F.svg" xlink:type="simple" xlink:show="embed" xlink:actuate="onLoad" draw:mime-type="image/svg+xml"><text:p/></draw:image><draw:image xlink:href="Pictures/10000001000000D10000001C72E6CED9.png" xlink:type="simple" xlink:show="embed" xlink:actuate="onLoad" draw:mime-type="image/png"/><svg:title>TexMaths</svg:title><svg:desc>12§display§\text{area circle} = \pi * r^2  = \pi * \frac{\text{Hipotenuse}^2}{2}§svg§600§FALSE§</svg:desc></draw:frame></text:p>
      <text:p text:style-name="P15"/>
      <text:p text:style-name="Standard"/>
      <text:p text:style-name="Standard"><text:tab/><text:tab/><text:tab/><text:tab/><text:span text:style-name="T6">new formula for perimeter of circle</text:span></text:p>
      <text:p text:style-name="Standard"/>
      <text:p text:style-name="Standard"/>
      <text:p text:style-name="P15"><draw:frame text:anchor-type="as-char" svg:y="-0.2661in" draw:z-index="18" draw:name="Shape18" draw:style-name="gr1" draw:text-style-name="P6" svg:width="3.0551in" svg:height="0.4185in"><draw:image xlink:href="Pictures/10007F2E0000194300000376B6A7825F.svg" xlink:type="simple" xlink:show="embed" xlink:actuate="onLoad" draw:mime-type="image/svg+xml"><text:p/></draw:image><draw:image xlink:href="Pictures/10000001000000E800000020E0DC3D44.png" xlink:type="simple" xlink:show="embed" xlink:actuate="onLoad" draw:mime-type="image/png"/><svg:title>TexMaths</svg:title><svg:desc>12§display§\text{perimeter of circle} = 2\pi r =  2*\pi * \frac{\sqrt{side^2}}{\sqrt{2}}§svg§600§FALSE§</svg:desc></draw:frame></text:p>
      <text:p text:style-name="Standard"/>
      <text:p text:style-name="Standard"><text:soft-page-break/>develop fraction on right side.</text:p>
      <text:p text:style-name="Standard"/>
      <text:p text:style-name="P15"><draw:frame text:anchor-type="as-char" svg:y="-0.2335in" draw:z-index="19" draw:name="Shape19" draw:style-name="gr1" draw:text-style-name="P6" svg:width="2.7134in" svg:height="0.3925in"><draw:image xlink:href="Pictures/100074EE000016700000033F68DEA374.svg" xlink:type="simple" xlink:show="embed" xlink:actuate="onLoad" draw:mime-type="image/svg+xml"><text:p/></draw:image><draw:image xlink:href="Pictures/10000001000000CE0000001E6ED67534.png" xlink:type="simple" xlink:show="embed" xlink:actuate="onLoad" draw:mime-type="image/png"/><svg:title>TexMaths</svg:title><svg:desc>12§display§\text{perimeter of circle}\,\, 2*\pi * \frac{\text{Hipotenuse}}{\sqrt{2}}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13:42:24.069755554</meta:creation-date>
    <dc:date>2026-07-01T14:10:33.902542448</dc:date>
    <meta:editing-duration>PT27M57S</meta:editing-duration>
    <meta:editing-cycles>36</meta:editing-cycles>
    <meta:generator>LibreOffice/26.2.3.2$Linux_X86_64 LibreOffice_project/70e089b17412e4cb7773e41413306b17a2328c34</meta:generator>
    <meta:document-statistic meta:table-count="0" meta:image-count="1" meta:object-count="0" meta:page-count="3" meta:paragraph-count="43" meta:word-count="123" meta:character-count="685" meta:non-whitespace-character-count="538"/>
  </office:meta>
</office:document-meta>
</file>