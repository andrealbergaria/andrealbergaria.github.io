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258" officeooo:paragraph-rsid="0018b258"/>
    </style:style>
    <style:style style:name="P2" style:family="paragraph" style:parent-style-name="Standard">
      <style:text-properties officeooo:rsid="001a8974" officeooo:paragraph-rsid="001a8974"/>
    </style:style>
    <style:style style:name="P3" style:family="paragraph" style:parent-style-name="Standard">
      <style:text-properties officeooo:rsid="0004e5d1" officeooo:paragraph-rsid="001e1708"/>
    </style:style>
    <style:style style:name="T1" style:family="text">
      <style:text-properties fo:font-size="14pt" fo:font-weight="bold" officeooo:rsid="00215f29" style:font-size-asian="14pt" style:font-weight-asian="bold" style:font-size-complex="14pt" style:font-weight-complex="bold"/>
    </style:style>
    <style:style style:name="T2" style:family="text">
      <style:text-properties officeooo:rsid="001f499e"/>
    </style:style>
    <style:style style:name="T3" style:family="text">
      <style:text-properties officeooo:rsid="0023c2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Does life exists outside our system? </text:span></text:p>
      <text:p text:style-name="P1"/>
      <text:p text:style-name="P1">If we have 12 planets on our solar system, and one has life. What’s the probability that we will find life on other systems? As in vega?</text:p>
      <text:p text:style-name="P1"/>
      <text:p text:style-name="P1">Which systems should we visit first? To know if there is life on other system either we</text:p>
      <text:p text:style-name="P1">-choose the closests system</text:p>
      <text:p text:style-name="P1">or</text:p>
      <text:p text:style-name="P1">-systems with many planets.</text:p>
      <text:p text:style-name="P1"/>
      <text:p text:style-name="P1">Use probabilistic methods (e.g If it has a sun, there’s a big probability, to have planets with life)</text:p>
      <text:p text:style-name="P1"/>
      <text:p text:style-name="P1">probabilitics methods</text:p>
      <text:p text:style-name="P1">-Planet needs energy</text:p>
      <text:p text:style-name="P1">-physics aspects , like gravitic force</text:p>
      <text:p text:style-name="P1">-common things with our solar system. Which are? To support life ? unless life is a lot different, doesn’t need the things to exist, that we have..like breating oxygen.</text:p>
      <text:p text:style-name="P1"/>
      <text:p text:style-name="P2">What about search for oxygen related gas? How to bodies get energy? Seems generally assumed, that we need energy one way or the other (oxygen, food, etc)..</text:p>
      <text:p text:style-name="P2"/>
      <text:p text:style-name="P3">Variables on life finding (things that can be used on models, to check if a planet has life).</text:p>
      <text:p text:style-name="P3"/>
      <text:p text:style-name="P3">Minerals (resources ...as in planet resources)</text:p>
      <text:p text:style-name="P3">water or substitute for water.</text:p>
      <text:p text:style-name="P3"/>
      <text:p text:style-name="P3">Instead of using models, check the data on computer<text:span text:style-name="T2">s already present</text:span>, and search , for it using A.I. <text:span text:style-name="T3">N</text:span>asa, <text:span text:style-name="T3">probably has a lot of data (</text:span>has like 50 years of data..<text:span text:style-name="T3">or more)</text:span>, too technically, or to extense… so use A.I. <text:span text:style-name="T3">to query the data</text:span>..since <text:span text:style-name="T2">information is in </text:span>digital <text:span text:style-name="T3">format </text:span><text:s/>anyway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21:55:29.526014902</meta:creation-date>
    <dc:date>2026-06-20T17:50:33.022309177</dc:date>
    <meta:editing-duration>PT7M21S</meta:editing-duration>
    <meta:editing-cycles>7</meta:editing-cycles>
    <meta:generator>LibreOffice/26.2.3.2$Linux_X86_64 LibreOffice_project/70e089b17412e4cb7773e41413306b17a2328c34</meta:generator>
    <meta:document-statistic meta:table-count="0" meta:image-count="0" meta:object-count="0" meta:page-count="1" meta:paragraph-count="16" meta:word-count="223" meta:character-count="1272" meta:non-whitespace-character-count="1060"/>
  </office:meta>
</office:document-meta>
</file>